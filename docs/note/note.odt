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.0201in" fo:margin-bottom="0.0201in" style:contextual-spacing="false"/>
      <style:text-properties style:font-name="Liberation Serif" fo:font-size="13pt" fo:font-weight="normal" officeooo:rsid="00190106" officeooo:paragraph-rsid="00190106" style:font-size-asian="13pt" style:font-weight-asian="normal" style:font-size-complex="13pt" style:font-weight-complex="normal"/>
    </style:style>
    <style:style style:name="P2" style:family="paragraph" style:parent-style-name="Heading_20_2">
      <style:paragraph-properties fo:margin-top="0.0201in" fo:margin-bottom="0.0201in" style:contextual-spacing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3" style:family="paragraph" style:parent-style-name="Preformatted_20_Text">
      <style:paragraph-properties fo:margin-left="0in" fo:margin-right="0in" fo:margin-top="0.0201in" fo:margin-bottom="0.0201in" style:contextual-spacing="false" fo:text-indent="0in" style:auto-text-indent="false"/>
    </style:style>
    <style:style style:name="P4" style:family="paragraph" style:parent-style-name="Preformatted_20_Text">
      <style:paragraph-properties fo:margin-top="0.0201in" fo:margin-bottom="0.0201in" style:contextual-spacing="false"/>
    </style:style>
    <style:style style:name="P5" style:family="paragraph" style:parent-style-name="Standard">
      <style:paragraph-properties fo:margin-top="0.0201in" fo:margin-bottom="0.0201in" style:contextual-spacing="false"/>
      <style:text-properties fo:font-size="13pt" fo:font-weight="bold" officeooo:rsid="00110132" officeooo:paragraph-rsid="00110132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.0201in" fo:margin-bottom="0.0201in" style:contextual-spacing="false"/>
      <style:text-properties fo:font-size="13pt" fo:font-weight="bold" officeooo:rsid="0012ca60" officeooo:paragraph-rsid="0012ca60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.0201in" fo:margin-bottom="0.0201in" style:contextual-spacing="false"/>
      <style:text-properties fo:font-size="13pt" fo:font-weight="bold" officeooo:rsid="00190106" officeooo:paragraph-rsid="00190106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top="0.0201in" fo:margin-bottom="0.0201in" style:contextual-spacing="false"/>
      <style:text-properties fo:font-size="13pt" officeooo:rsid="00110132" officeooo:paragraph-rsid="00110132" style:font-size-asian="13pt" style:font-size-complex="13pt"/>
    </style:style>
    <style:style style:name="P9" style:family="paragraph" style:parent-style-name="Standard">
      <style:paragraph-properties fo:margin-top="0.0201in" fo:margin-bottom="0.0201in" style:contextual-spacing="false"/>
      <style:text-properties fo:font-size="13pt" officeooo:rsid="00162c35" officeooo:paragraph-rsid="0017bd1e" style:font-size-asian="13pt" style:font-size-complex="13pt"/>
    </style:style>
    <style:style style:name="P10" style:family="paragraph" style:parent-style-name="Standard">
      <style:paragraph-properties fo:margin-top="0.0201in" fo:margin-bottom="0.0201in" style:contextual-spacing="false"/>
      <style:text-properties fo:font-size="13pt" officeooo:rsid="00190106" officeooo:paragraph-rsid="00190106" style:font-size-asian="13pt" style:font-size-complex="13pt"/>
    </style:style>
    <style:style style:name="P11" style:family="paragraph" style:parent-style-name="Text_20_body">
      <style:paragraph-properties fo:margin-top="0.0201in" fo:margin-bottom="0.0201in" style:contextual-spacing="false"/>
      <style:text-properties style:font-name="Liberation Serif" fo:font-size="13pt" style:font-size-asian="13pt" style:font-size-complex="13pt"/>
    </style:style>
    <style:style style:name="P12" style:family="paragraph" style:parent-style-name="Text_20_body">
      <style:paragraph-properties fo:margin-top="0.0201in" fo:margin-bottom="0.0201in" style:contextual-spacing="false"/>
    </style:style>
    <style:style style:name="P13" style:family="paragraph" style:parent-style-name="Text_20_body">
      <style:paragraph-properties fo:margin-top="0.0201in" fo:margin-bottom="0.0201in" style:contextual-spacing="false"/>
      <style:text-properties fo:font-size="13pt" style:font-size-asian="13pt" style:font-size-complex="13pt"/>
    </style:style>
    <style:style style:name="T1" style:family="text">
      <style:text-properties officeooo:rsid="001e1d3c"/>
    </style:style>
    <style:style style:name="T2" style:family="text">
      <style:text-properties officeooo:rsid="0027f7da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3pt" style:font-size-asian="13pt" style:font-size-complex="13pt"/>
    </style:style>
    <style:style style:name="T5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Hệ trục X-quad</text:p>
      <text:p text:style-name="P8">M1 = front-left</text:p>
      <text:p text:style-name="P8">M2 = front-right</text:p>
      <text:p text:style-name="P8">M3 = rear-right</text:p>
      <text:p text:style-name="P8">M4 = rear-left</text:p>
      <text:p text:style-name="P5">2. Cánh test</text:p>
      <text:p text:style-name="P8">M1 front-left <text:s text:c="2"/>= CW</text:p>
      <text:p text:style-name="P8">M2 front-right <text:s/>= CCW</text:p>
      <text:p text:style-name="P8">M3 rear-right <text:s text:c="2"/>= CW</text:p>
      <text:p text:style-name="P8">M4 rear-left <text:s text:c="3"/>= CCW</text:p>
      <text:p text:style-name="P6">3. IMU và Madgwick test</text:p>
      <text:p text:style-name="P9">Level / +Z up:</text:p>
      <text:p text:style-name="P9">ax=0.01 ay=-0.02 az=1.00 <text:s/>→ đúng, gần (0, 0, +1)</text:p>
      <text:p text:style-name="P9">Upside down / -Z up:</text:p>
      <text:p text:style-name="P9">ax=-0.03 ay=0.01 az=-0.99 → đúng, gần (0, 0, -1)</text:p>
      <text:p text:style-name="P9">Front ngẩng lên / +X up:</text:p>
      <text:p text:style-name="P9">ax=0.99 ay=0.01 az=0.03 → đúng, gần (+1, 0, 0) → gy âm → pitch âm</text:p>
      <text:p text:style-name="P9">Front chúi xuống / -X up:</text:p>
      <text:p text:style-name="P9">ax=-1.01 ay=0.02 az=-0.01 → đúng, gần (-1, 0, 0) → gy dương → pitch dương</text:p>
      <text:p text:style-name="P9">Nghiêng sang phải / +Y up:</text:p>
      <text:p text:style-name="P9">ax=0.00 ay=0.98 az=0.04 → đúng, gần (0, +1, 0) <text:span text:style-name="T1">0 → gx dương → roll dương</text:span></text:p>
      <text:p text:style-name="P9">Nghiêng sang trái / -Y up:</text:p>
      <text:p text:style-name="P9">ax=0.02 ay=-1.00 az=0.01 → đúng, gần (0, -1, 0) → gx âm → roll âm</text:p>
      <text:p text:style-name="P9">Nhìn từ trên xuống:</text:p>
      <text:p text:style-name="P9">xoay ngược chiều kim đồng hồ / yaw left <text:s/>→ gz dương → yaw dương</text:p>
      <text:p text:style-name="P9">xoay cùng chiều kim đồng hồ / yaw right <text:s/>→ gz âm → yaw âm</text:p>
      <text:p text:style-name="P7">4. <text:span text:style-name="T2">Output pid test</text:span></text:p>
      <text:h text:style-name="P1" text:outline-level="2"><text:span text:style-name="T5">Bước 1</text:span>: chỉ test roll</text:h>
      <text:p text:style-name="P11">Tạm thời để:</text:p>
      <text:section text:style-name="Sect1" text:name="code-block-viewer">
        <text:p text:style-name="P3"><text:span text:style-name="Source_20_Text"><text:span text:style-name="T4">pitch_output = 0;</text:span></text:span></text:p>
        <text:p text:style-name="P4"><text:span text:style-name="Source_20_Text"><text:span text:style-name="T4">yaw_output <text:s text:c="2"/>= 0;</text:span></text:span></text:p>
      </text:section>
      <text:p text:style-name="P13"><text:span text:style-name="T3">Mixer chỉ còn:</text:span></text:p>
      <text:p text:style-name="P11">Tháo cánh, nghiêng drone sang phải.</text:p>
      <text:p text:style-name="P11">Đúng phải là:</text:p>
      <text:section text:style-name="Sect1" text:name="Section2">
        <text:p text:style-name="P3"><text:bookmark text:name="code-block-viewer Copy 1"/><text:span text:style-name="Source_20_Text"><text:span text:style-name="T4">M2, M3 tăng</text:span></text:span></text:p>
        <text:p text:style-name="P4"><text:span text:style-name="Source_20_Text"><text:span text:style-name="T4">M1, M4 giảm</text:span></text:span></text:p>
      </text:section>
      <text:p text:style-name="P12"><text:span text:style-name="T4">Nếu ngược lại, đảo dấu </text:span><text:span text:style-name="Source_20_Text"><text:span text:style-name="T4">roll_output</text:span></text:span><text:span text:style-name="T4"> hoặc đảo dấu roll trong mixer.</text:span></text:p>
      <text:h text:style-name="P2" text:outline-level="2"><text:soft-page-break/><text:span text:style-name="T5">Bước 2</text:span>: thêm pitch</text:h>
      <text:p text:style-name="P13"><text:span text:style-name="T3">Khi roll đã đúng, thêm pitch.</text:span></text:p>
      <text:p text:style-name="P11">Chúc mũi drone xuống.</text:p>
      <text:p text:style-name="P11">Đúng phải là:</text:p>
      <text:section text:style-name="Sect1" text:name="Section4">
        <text:p text:style-name="P3"><text:bookmark text:name="code-block-viewer Copy 3"/><text:span text:style-name="Source_20_Text"><text:span text:style-name="T4">M1, M2 tăng</text:span></text:span></text:p>
        <text:p text:style-name="P4"><text:span text:style-name="Source_20_Text"><text:span text:style-name="T4">M3, M4 giảm</text:span></text:span></text:p>
      </text:section>
      <text:p text:style-name="P12"><text:span text:style-name="T4">Nếu ngược lại, đảo dấu </text:span><text:span text:style-name="Source_20_Text"><text:span text:style-name="T4">pitch_output</text:span></text:span><text:span text:style-name="T4"> hoặc đảo dấu pitch trong mixer.</text:span></text:p>
      <text:h text:style-name="P2" text:outline-level="2"><text:span text:style-name="T5">Bước 3</text:span>: thêm yaw</text:h>
      <text:p text:style-name="P13"><text:span text:style-name="T3">Khi roll và pitch đã đúng, thêm yaw.</text:span></text:p>
      <text:p text:style-name="P11">Yaw phải, với layout của bạn:</text:p>
      <text:section text:style-name="Sect1" text:name="Section6">
        <text:p text:style-name="P3"><text:bookmark text:name="code-block-viewer Copy 5"/><text:span text:style-name="Source_20_Text"><text:span text:style-name="T4">M1 CW</text:span></text:span></text:p>
        <text:p text:style-name="P4"><text:span text:style-name="Source_20_Text"><text:span text:style-name="T4">M2 CCW</text:span></text:span></text:p>
        <text:p text:style-name="P4"><text:span text:style-name="Source_20_Text"><text:span text:style-name="T4">M3 CW</text:span></text:span></text:p>
        <text:p text:style-name="P4"><text:span text:style-name="Source_20_Text"><text:span text:style-name="T4">M4 CCW</text:span></text:span></text:p>
      </text:section>
      <text:p text:style-name="P11">Đúng phải là:</text:p>
      <text:section text:style-name="Sect1" text:name="Section7">
        <text:p text:style-name="P3"><text:bookmark text:name="code-block-viewer Copy 6"/><text:span text:style-name="Source_20_Text"><text:span text:style-name="T4">M2, M4 tăng</text:span></text:span></text:p>
        <text:p text:style-name="P4"><text:span text:style-name="Source_20_Text"><text:span text:style-name="T4">M1, M3 giảm</text:span></text:span></text:p>
      </text:section>
      <text:p text:style-name="P12"><text:span text:style-name="T4">Nếu ngược lại, đảo dấu </text:span><text:span text:style-name="Source_20_Text"><text:span text:style-name="T4">yaw_output</text:span></text:span><text:span text:style-name="T4"> hoặc đảo dấu yaw trong mixer.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9T22:25:01.046513181</meta:creation-date>
    <dc:date>2026-06-13T14:23:55.122625116</dc:date>
    <meta:editing-duration>PT2H22M27S</meta:editing-duration>
    <meta:editing-cycles>34</meta:editing-cycles>
    <meta:generator>LibreOffice/24.2.7.2$Linux_X86_64 LibreOffice_project/420$Build-2</meta:generator>
    <meta:document-statistic meta:table-count="0" meta:image-count="0" meta:object-count="0" meta:page-count="2" meta:paragraph-count="55" meta:word-count="316" meta:character-count="1444" meta:non-whitespace-character-count="1170"/>
  </office:meta>
</office:document-meta>
</file>