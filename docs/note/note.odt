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0132" officeooo:paragraph-rsid="00110132"/>
    </style:style>
    <style:style style:name="P2" style:family="paragraph" style:parent-style-name="Standard">
      <style:text-properties officeooo:rsid="0012ca60" officeooo:paragraph-rsid="0012ca60"/>
    </style:style>
    <style:style style:name="P3" style:family="paragraph" style:parent-style-name="Standard">
      <style:text-properties officeooo:rsid="0012ca60" officeooo:paragraph-rsid="0012ca60"/>
    </style:style>
    <style:style style:name="P4" style:family="paragraph" style:parent-style-name="Standard">
      <style:text-properties officeooo:rsid="00162c35" officeooo:paragraph-rsid="00162c35"/>
    </style:style>
    <style:style style:name="P5" style:family="paragraph" style:parent-style-name="Standard">
      <style:text-properties officeooo:rsid="0017bd1e" officeooo:paragraph-rsid="0017bd1e"/>
    </style:style>
    <style:style style:name="P6" style:family="paragraph" style:parent-style-name="Standard">
      <style:text-properties officeooo:rsid="00190106" officeooo:paragraph-rsid="001901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M1 = front-left</text:p>
      <text:p text:style-name="P1">M2 = front-right</text:p>
      <text:p text:style-name="P1">M3 = rear-right</text:p>
      <text:p text:style-name="P1">M4 = rear-left</text:p>
      <text:p text:style-name="P1">2.</text:p>
      <text:p text:style-name="P1">M1 front-left <text:s text:c="2"/>= CW</text:p>
      <text:p text:style-name="P1">M2 front-right <text:s/>= CCW</text:p>
      <text:p text:style-name="P1">M3 rear-right <text:s text:c="2"/>= CW</text:p>
      <text:p text:style-name="P1">M4 rear-left <text:s text:c="3"/>= CCW</text:p>
      <text:p text:style-name="P2">3.</text:p>
      <text:p text:style-name="P5">+Z: drone nằm ngang</text:p>
      <text:p text:style-name="P5">-Z: drone lật úp</text:p>
      <text:p text:style-name="P4">+X: drone ngẩng</text:p>
      <text:p text:style-name="P4">-X: drone chúi</text:p>
      <text:p text:style-name="P4">+Y: drone nghiêng phải</text:p>
      <text:p text:style-name="P4">-Y: drone nghiêng trái</text:p>
      <text:p text:style-name="P6">4.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9T22:25:01.046513181</meta:creation-date>
    <dc:date>2026-06-13T11:00:34.570305087</dc:date>
    <meta:editing-duration>PT10M34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1" meta:paragraph-count="18" meta:word-count="54" meta:character-count="258" meta:non-whitespace-character-count="214"/>
  </office:meta>
</office:document-meta>
</file>