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132" officeooo:paragraph-rsid="00110132"/>
    </style:style>
    <style:style style:name="P2" style:family="paragraph" style:parent-style-name="Standard">
      <style:text-properties officeooo:rsid="0012ca60" officeooo:paragraph-rsid="0012ca60"/>
    </style:style>
    <style:style style:name="P3" style:family="paragraph" style:parent-style-name="Standard">
      <style:text-properties officeooo:rsid="0012ca60" officeooo:paragraph-rsid="0012ca60"/>
    </style:style>
    <style:style style:name="T1" style:family="text">
      <style:text-properties officeooo:rsid="001425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M1 = front-left</text:p>
      <text:p text:style-name="P1">M2 = front-right</text:p>
      <text:p text:style-name="P1">M3 = rear-right</text:p>
      <text:p text:style-name="P1">M4 = rear-left</text:p>
      <text:p text:style-name="P1">2.</text:p>
      <text:p text:style-name="P1">M1 front-left <text:s text:c="2"/>= CW</text:p>
      <text:p text:style-name="P1">M2 front-right <text:s/>= CCW</text:p>
      <text:p text:style-name="P1">M3 rear-right <text:s text:c="2"/>= CW</text:p>
      <text:p text:style-name="P1">M4 rear-left <text:s text:c="3"/>= CCW</text:p>
      <text:p text:style-name="P2">3.</text:p>
      <text:p text:style-name="P2">roll phải <text:s/>= roll dương</text:p>
      <text:p text:style-name="P2">roll trái <text:s/>= roll âm</text:p>
      <text:p text:style-name="P2"/>
      <text:p text:style-name="P2">pitch chúc xuống = pitch dương</text:p>
      <text:p text:style-name="P2">pitch ngửa lên <text:s text:c="2"/>= pitch â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9T22:25:01.046513181</meta:creation-date>
    <dc:date>2026-06-11T10:50:19.550650951</dc:date>
    <meta:editing-duration>PT9M1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53" meta:character-count="248" meta:non-whitespace-character-count="198"/>
  </office:meta>
</office:document-meta>
</file>